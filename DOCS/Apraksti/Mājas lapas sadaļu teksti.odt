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text:style-name="WW_CharLFO5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ListParagraph" style:list-style-name="LFO13" style:family="paragraph"/>
    <style:style style:name="P5" style:parent-style-name="ListParagraph" style:list-style-name="LFO13" style:family="paragraph"/>
    <style:style style:name="P6" style:parent-style-name="ListParagraph" style:list-style-name="LFO13" style:family="paragraph"/>
    <style:style style:name="P7" style:parent-style-name="ListParagraph" style:list-style-name="LFO13" style:family="paragraph"/>
    <style:style style:name="P8" style:parent-style-name="ListParagraph" style:list-style-name="LFO13" style:family="paragraph"/>
    <style:style style:name="P9" style:parent-style-name="ListParagraph" style:list-style-name="LFO13" style:family="paragraph"/>
    <style:style style:name="P10" style:parent-style-name="ListParagraph" style:list-style-name="LFO13" style:family="paragraph"/>
    <style:style style:name="P11" style:parent-style-name="ListParagraph" style:list-style-name="LFO13" style:family="paragraph"/>
    <style:style style:name="P12" style:parent-style-name="ListParagraph" style:list-style-name="LFO13" style:family="paragraph"/>
    <style:style style:name="P13" style:parent-style-name="ListParagraph" style:list-style-name="LFO13" style:family="paragraph"/>
    <style:style style:name="P14" style:parent-style-name="ListParagraph" style:list-style-name="LFO13" style:family="paragraph"/>
    <style:style style:name="P15" style:parent-style-name="Normal" style:family="paragraph">
      <style:text-properties fo:font-size="12pt" style:font-size-asian="12pt" style:font-size-complex="12pt"/>
    </style:style>
    <style:style style:name="P16" style:parent-style-name="Normal" style:family="paragraph">
      <style:text-properties fo:font-weight="bold" style:font-weight-asian="bold" style:font-weight-complex="bold" fo:font-size="12pt" style:font-size-asian="12pt" style:font-size-complex="12pt"/>
    </style:style>
    <style:style style:name="P17" style:parent-style-name="ListParagraph" style:list-style-name="LFO56" style:family="paragraph"/>
    <style:style style:name="P18" style:parent-style-name="ListParagraph" style:list-style-name="LFO56" style:family="paragraph"/>
    <style:style style:name="P19" style:parent-style-name="Normal" style:family="paragraph">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fo:font-size="14pt" style:font-size-asian="14pt" style:font-size-complex="14pt"/>
    </style:style>
    <style:style style:name="P24" style:parent-style-name="Normal" style:family="paragraph">
      <style:text-properties fo:font-weight="bold" style:font-weight-asian="bold" style:font-weight-complex="bold" fo:font-size="14pt" style:font-size-asian="14pt" style:font-size-complex="14pt"/>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text-properties fo:font-weight="bold" style:font-weight-asian="bold" style:font-weight-complex="bold"/>
    </style:style>
    <style:style style:name="P28" style:parent-style-name="Normal" style:list-style-name="LFO14" style:family="paragraph">
      <style:paragraph-properties fo:text-align="justify"/>
    </style:style>
    <style:style style:name="P29" style:parent-style-name="Normal" style:list-style-name="LFO14" style:family="paragraph">
      <style:paragraph-properties fo:text-align="justify"/>
    </style:style>
    <style:style style:name="P30" style:parent-style-name="Normal" style:list-style-name="LFO14" style:family="paragraph">
      <style:paragraph-properties fo:text-align="justify"/>
    </style:style>
    <style:style style:name="P31" style:parent-style-name="Normal" style:list-style-name="LFO14" style:family="paragraph">
      <style:paragraph-properties fo:text-align="justify"/>
    </style:style>
    <style:style style:name="P32" style:parent-style-name="Normal" style:list-style-name="LFO14" style:family="paragraph">
      <style:paragraph-properties fo:text-align="justify"/>
    </style:style>
    <style:style style:name="P33" style:parent-style-name="Normal" style:list-style-name="LFO14" style:family="paragraph">
      <style:paragraph-properties fo:text-align="justify"/>
    </style:style>
    <style:style style:name="P34" style:parent-style-name="Normal" style:list-style-name="LFO14" style:family="paragraph">
      <style:paragraph-properties fo:text-align="justify"/>
    </style:style>
    <style:style style:name="P35" style:parent-style-name="Normal" style:list-style-name="LFO14"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text-properties fo:font-weight="bold" style:font-weight-asian="bold" style:font-weight-complex="bold" fo:font-size="14pt" style:font-size-asian="14pt" style:font-size-complex="14pt"/>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weight="bold" style:font-weight-asian="bold" style:font-weight-complex="bold"/>
    </style:style>
    <style:style style:name="P44" style:parent-style-name="Normal" style:family="paragraph">
      <style:paragraph-properties fo:text-align="justify"/>
    </style:style>
    <style:style style:name="P45" style:parent-style-name="Normal" style:list-style-name="LFO15" style:family="paragraph">
      <style:paragraph-properties fo:text-align="justify"/>
    </style:style>
    <style:style style:name="P46" style:parent-style-name="Normal" style:list-style-name="LFO15" style:family="paragraph">
      <style:paragraph-properties fo:text-align="justify"/>
    </style:style>
    <style:style style:name="P47" style:parent-style-name="Normal" style:list-style-name="LFO15" style:family="paragraph">
      <style:paragraph-properties fo:text-align="justify"/>
    </style:style>
    <style:style style:name="P48" style:parent-style-name="Normal" style:list-style-name="LFO15" style:family="paragraph">
      <style:paragraph-properties fo:text-align="justify"/>
    </style:style>
    <style:style style:name="P49" style:parent-style-name="Normal" style:list-style-name="LFO15" style:family="paragraph">
      <style:paragraph-properties fo:text-align="justify"/>
    </style:style>
    <style:style style:name="P50" style:parent-style-name="Normal" style:family="paragraph">
      <style:paragraph-properties fo:text-align="justify"/>
      <style:text-properties fo:font-weight="bold" style:font-weight-asian="bold" style:font-weight-complex="bold"/>
    </style:style>
    <style:style style:name="P51" style:parent-style-name="Normal" style:family="paragraph">
      <style:paragraph-properties fo:text-align="justify"/>
    </style:style>
    <style:style style:name="P52" style:parent-style-name="Normal" style:list-style-name="LFO16" style:family="paragraph">
      <style:paragraph-properties fo:text-align="justify"/>
    </style:style>
    <style:style style:name="P53" style:parent-style-name="Normal" style:list-style-name="LFO16" style:family="paragraph">
      <style:paragraph-properties fo:text-align="justify"/>
    </style:style>
    <style:style style:name="P54" style:parent-style-name="Normal" style:list-style-name="LFO16" style:family="paragraph">
      <style:paragraph-properties fo:text-align="justify"/>
    </style:style>
    <style:style style:name="P55" style:parent-style-name="Normal" style:list-style-name="LFO16" style:family="paragraph">
      <style:paragraph-properties fo:text-align="justify"/>
    </style:style>
    <style:style style:name="P56" style:parent-style-name="Normal" style:list-style-name="LFO16"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text-properties fo:font-weight="bold" style:font-weight-asian="bold" style:font-weight-complex="bold"/>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text-properties fo:font-weight="bold" style:font-weight-asian="bold" style:font-weight-complex="bold" fo:font-size="14pt" style:font-size-asian="14pt" style:font-size-complex="14pt"/>
    </style:style>
    <style:style style:name="P63" style:parent-style-name="Normal" style:family="paragraph">
      <style:paragraph-properties fo:text-align="justify"/>
    </style:style>
    <style:style style:name="P64" style:parent-style-name="Normal" style:family="paragraph">
      <style:paragraph-properties fo:text-align="justify"/>
      <style:text-properties fo:font-weight="bold" style:font-weight-asian="bold" style:font-weight-complex="bold"/>
    </style:style>
    <style:style style:name="P65" style:parent-style-name="Normal" style:list-style-name="LFO18" style:family="paragraph">
      <style:paragraph-properties fo:text-align="justify"/>
    </style:style>
    <style:style style:name="P66" style:parent-style-name="Normal" style:list-style-name="LFO18" style:family="paragraph">
      <style:paragraph-properties fo:text-align="justify"/>
    </style:style>
    <style:style style:name="P67" style:parent-style-name="Normal" style:list-style-name="LFO18" style:family="paragraph">
      <style:paragraph-properties fo:text-align="justify"/>
    </style:style>
    <style:style style:name="P68" style:parent-style-name="Normal" style:list-style-name="LFO18" style:family="paragraph">
      <style:paragraph-properties fo:text-align="justify"/>
    </style:style>
    <style:style style:name="P69" style:parent-style-name="Normal" style:list-style-name="LFO18" style:family="paragraph">
      <style:paragraph-properties fo:text-align="justify"/>
    </style:style>
    <style:style style:name="P70" style:parent-style-name="Normal" style:list-style-name="LFO18"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text-properties fo:font-weight="bold" style:font-weight-asian="bold" style:font-weight-complex="bold"/>
    </style:style>
    <style:style style:name="P74" style:parent-style-name="Normal" style:family="paragraph">
      <style:paragraph-properties fo:text-align="justify"/>
    </style:style>
    <style:style style:name="P75" style:parent-style-name="Normal" style:list-style-name="LFO19" style:family="paragraph">
      <style:paragraph-properties fo:text-align="justify"/>
    </style:style>
    <style:style style:name="P76" style:parent-style-name="Normal" style:list-style-name="LFO19" style:family="paragraph">
      <style:paragraph-properties fo:text-align="justify"/>
    </style:style>
    <style:style style:name="P77" style:parent-style-name="Normal" style:list-style-name="LFO19" style:family="paragraph">
      <style:paragraph-properties fo:text-align="justify"/>
    </style:style>
    <style:style style:name="P78" style:parent-style-name="Normal" style:list-style-name="LFO19" style:family="paragraph">
      <style:paragraph-properties fo:text-align="justify"/>
    </style:style>
    <style:style style:name="P79" style:parent-style-name="Normal" style:list-style-name="LFO19"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text-properties fo:font-weight="bold" style:font-weight-asian="bold" style:font-weight-complex="bold"/>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T85" style:parent-style-name="DefaultParagraphFon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paragraph-properties fo:text-align="justify"/>
    </style:style>
    <style:style style:name="P88" style:parent-style-name="Normal" style:family="paragraph">
      <style:paragraph-properties fo:text-align="justify"/>
      <style:text-properties fo:font-weight="bold" style:font-weight-asian="bold" style:font-weight-complex="bold"/>
    </style:style>
    <style:style style:name="P89" style:parent-style-name="Normal" style:family="paragraph">
      <style:paragraph-properties fo:text-align="justify"/>
      <style:text-properties fo:font-weight="bold" style:font-weight-asian="bold" style:font-weight-complex="bold"/>
    </style:style>
    <style:style style:name="P90" style:parent-style-name="Normal" style:family="paragraph">
      <style:paragraph-properties fo:text-align="justify"/>
    </style:style>
    <style:style style:name="P91" style:parent-style-name="Normal" style:list-style-name="LFO21" style:family="paragraph">
      <style:paragraph-properties fo:text-align="justify"/>
    </style:style>
    <style:style style:name="P92" style:parent-style-name="Normal" style:list-style-name="LFO21" style:family="paragraph">
      <style:paragraph-properties fo:text-align="justify"/>
    </style:style>
    <style:style style:name="P93" style:parent-style-name="Normal" style:list-style-name="LFO21" style:family="paragraph">
      <style:paragraph-properties fo:text-align="justify"/>
    </style:style>
    <style:style style:name="P94" style:parent-style-name="Normal" style:list-style-name="LFO21" style:family="paragraph">
      <style:paragraph-properties fo:text-align="justify"/>
    </style:style>
    <style:style style:name="P95" style:parent-style-name="Normal" style:list-style-name="LFO21" style:family="paragraph">
      <style:paragraph-properties fo:text-align="justify"/>
    </style:style>
    <style:style style:name="P96" style:parent-style-name="Normal" style:family="paragraph">
      <style:paragraph-properties fo:text-align="justify"/>
    </style:style>
    <style:style style:name="P97" style:parent-style-name="Normal" style:list-style-name="LFO22" style:family="paragraph">
      <style:paragraph-properties fo:text-align="justify"/>
    </style:style>
    <style:style style:name="P98" style:parent-style-name="Normal" style:list-style-name="LFO22" style:family="paragraph">
      <style:paragraph-properties fo:text-align="justify"/>
    </style:style>
    <style:style style:name="P99" style:parent-style-name="Normal" style:list-style-name="LFO22" style:family="paragraph">
      <style:paragraph-properties fo:text-align="justify"/>
    </style:style>
    <style:style style:name="P100" style:parent-style-name="Normal" style:family="paragraph">
      <style:paragraph-properties fo:text-align="justify" fo:margin-left="0.5in">
        <style:tab-stops/>
      </style:paragraph-properties>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text-properties fo:font-weight="bold" style:font-weight-asian="bold" style:font-weight-complex="bold"/>
    </style:style>
    <style:style style:name="P104" style:parent-style-name="Normal" style:family="paragraph">
      <style:paragraph-properties fo:text-align="justify"/>
    </style:style>
    <style:style style:name="P105" style:parent-style-name="Normal" style:list-style-name="LFO23" style:family="paragraph">
      <style:paragraph-properties fo:text-align="justify"/>
    </style:style>
    <style:style style:name="P106" style:parent-style-name="Normal" style:list-style-name="LFO23" style:family="paragraph">
      <style:paragraph-properties fo:text-align="justify"/>
    </style:style>
    <style:style style:name="P107" style:parent-style-name="Normal" style:list-style-name="LFO23" style:family="paragraph">
      <style:paragraph-properties fo:text-align="justify"/>
    </style:style>
    <style:style style:name="P108" style:parent-style-name="Normal" style:list-style-name="LFO23" style:family="paragraph">
      <style:paragraph-properties fo:text-align="justify"/>
    </style:style>
    <style:style style:name="P109" style:parent-style-name="Normal" style:family="paragraph">
      <style:paragraph-properties fo:text-align="justify"/>
    </style:style>
    <style:style style:name="P110" style:parent-style-name="Normal" style:list-style-name="LFO24" style:family="paragraph">
      <style:paragraph-properties fo:text-align="justify"/>
    </style:style>
    <style:style style:name="P111" style:parent-style-name="Normal" style:list-style-name="LFO24" style:family="paragraph">
      <style:paragraph-properties fo:text-align="justify"/>
    </style:style>
    <style:style style:name="P112" style:parent-style-name="Normal" style:list-style-name="LFO24" style:family="paragraph">
      <style:paragraph-properties fo:text-align="justify"/>
    </style:style>
    <style:style style:name="P113" style:parent-style-name="Normal" style:family="paragraph">
      <style:paragraph-properties fo:text-align="justify"/>
      <style:text-properties fo:font-weight="bold" style:font-weight-asian="bold" style:font-weight-complex="bold" fo:color="#EE0000"/>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weight="bold" style:font-weight-asian="bold" style:font-weight-complex="bold"/>
    </style:style>
    <style:style style:name="P118" style:parent-style-name="Normal" style:family="paragraph">
      <style:paragraph-properties fo:text-align="justify"/>
    </style:style>
    <style:style style:name="P119" style:parent-style-name="Normal" style:list-style-name="LFO54" style:family="paragraph">
      <style:paragraph-properties fo:text-align="justify"/>
    </style:style>
    <style:style style:name="P120" style:parent-style-name="Normal" style:list-style-name="LFO54" style:family="paragraph">
      <style:paragraph-properties fo:text-align="justify"/>
    </style:style>
    <style:style style:name="P121" style:parent-style-name="Normal" style:list-style-name="LFO54" style:family="paragraph">
      <style:paragraph-properties fo:text-align="justify"/>
    </style:style>
    <style:style style:name="P122" style:parent-style-name="Normal" style:family="paragraph">
      <style:paragraph-properties fo:text-align="justify"/>
    </style:style>
    <style:style style:name="P123" style:parent-style-name="Normal" style:list-style-name="LFO55" style:family="paragraph">
      <style:paragraph-properties fo:text-align="justify"/>
    </style:style>
    <style:style style:name="P124" style:parent-style-name="Normal" style:list-style-name="LFO55" style:family="paragraph">
      <style:paragraph-properties fo:text-align="justify"/>
    </style:style>
    <style:style style:name="P125" style:parent-style-name="Normal" style:list-style-name="LFO55" style:family="paragraph">
      <style:paragraph-properties fo:text-align="justify"/>
    </style:style>
    <style:style style:name="P126" style:parent-style-name="Normal" style:list-style-name="LFO55"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text-properties fo:font-weight="bold" style:font-weight-asian="bold" style:font-weight-complex="bold"/>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text-properties fo:font-weight="bold" style:font-weight-asian="bold" style:font-weight-complex="bold"/>
    </style:style>
    <style:style style:name="P134" style:parent-style-name="Normal" style:family="paragraph">
      <style:paragraph-properties fo:text-align="justify"/>
    </style:style>
    <style:style style:name="P135" style:parent-style-name="Normal" style:family="paragraph">
      <style:text-properties fo:color="#EE0000"/>
    </style:style>
    <style:style style:name="P136" style:parent-style-name="Normal" style:family="paragraph">
      <style:text-properties fo:font-weight="bold" style:font-weight-asian="bold" style:font-weight-complex="bold" fo:color="#EE0000"/>
    </style:style>
    <style:style style:name="P137" style:parent-style-name="Normal" style:family="paragraph">
      <style:text-properties fo:font-weight="bold" style:font-weight-asian="bold" style:font-weight-complex="bold"/>
    </style:style>
    <style:style style:name="P138" style:parent-style-name="Normal" style:list-style-name="LFO26" style:family="paragraph"/>
    <style:style style:name="P139" style:parent-style-name="Normal" style:list-style-name="LFO26" style:family="paragraph"/>
    <style:style style:name="P140" style:parent-style-name="Normal" style:list-style-name="LFO26" style:family="paragraph"/>
    <style:style style:name="P141" style:parent-style-name="Normal" style:list-style-name="LFO26" style:family="paragraph"/>
    <style:style style:name="P142" style:parent-style-name="Normal" style:list-style-name="LFO26" style:family="paragraph"/>
    <style:style style:name="P143" style:parent-style-name="Normal" style:list-style-name="LFO26" style:family="paragraph"/>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list-style-name="LFO27" style:family="paragraph"/>
    <style:style style:name="P147" style:parent-style-name="Normal" style:list-style-name="LFO27" style:family="paragraph"/>
    <style:style style:name="P148" style:parent-style-name="Normal" style:list-style-name="LFO27" style:family="paragraph"/>
    <style:style style:name="P149" style:parent-style-name="Normal" style:list-style-name="LFO27" style:family="paragraph"/>
    <style:style style:name="P150" style:parent-style-name="Normal" style:family="paragraph">
      <style:paragraph-properties fo:margin-left="0.5in">
        <style:tab-stops/>
      </style:paragraph-properties>
    </style:style>
    <style:style style:name="P151" style:parent-style-name="Normal" style:family="paragraph">
      <style:text-properties fo:font-weight="bold" style:font-weight-asian="bold" style:font-weight-complex="bold"/>
    </style:style>
    <style:style style:name="P152" style:parent-style-name="Normal" style:family="paragraph">
      <style:text-properties fo:font-weight="bold" style:font-weight-asian="bold" style:font-weight-complex="bold" fo:color="#EE0000"/>
    </style:style>
    <style:style style:name="P153" style:parent-style-name="Normal" style:family="paragraph">
      <style:text-properties fo:font-weight="bold" style:font-weight-asian="bold" style:font-weight-complex="bold"/>
    </style:style>
    <style:style style:name="P154" style:parent-style-name="Normal" style:list-style-name="LFO34" style:family="paragraph"/>
    <style:style style:name="P155" style:parent-style-name="Normal" style:list-style-name="LFO34" style:family="paragraph"/>
    <style:style style:name="P156" style:parent-style-name="Normal" style:list-style-name="LFO34" style:family="paragraph"/>
    <style:style style:name="P157" style:parent-style-name="Normal" style:list-style-name="LFO34" style:family="paragraph"/>
    <style:style style:name="P158" style:parent-style-name="Normal" style:list-style-name="LFO34" style:family="paragraph"/>
    <style:style style:name="P159" style:parent-style-name="Normal" style:list-style-name="LFO34" style:family="paragraph"/>
    <style:style style:name="P160" style:parent-style-name="Normal" style:family="paragraph">
      <style:text-properties fo:font-weight="bold" style:font-weight-asian="bold" style:font-weight-complex="bold"/>
    </style:style>
    <style:style style:name="P161" style:parent-style-name="Normal" style:list-style-name="LFO35" style:family="paragraph"/>
    <style:style style:name="P162" style:parent-style-name="Normal" style:list-style-name="LFO35" style:family="paragraph"/>
    <style:style style:name="P163" style:parent-style-name="Normal" style:list-style-name="LFO35" style:family="paragraph"/>
    <style:style style:name="P164" style:parent-style-name="Normal" style:list-style-name="LFO35" style:family="paragraph"/>
    <style:style style:name="P165" style:parent-style-name="Normal" style:list-style-name="LFO35" style:family="paragraph"/>
    <style:style style:name="P166" style:parent-style-name="Normal" style:list-style-name="LFO35" style:family="paragraph"/>
    <style:style style:name="P167" style:parent-style-name="Normal" style:family="paragraph">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P169" style:parent-style-name="Normal" style:list-style-name="LFO35" style:family="paragraph"/>
    <style:style style:name="P170" style:parent-style-name="Normal" style:list-style-name="LFO35" style:family="paragraph"/>
    <style:style style:name="P171" style:parent-style-name="Normal" style:family="paragraph">
      <style:paragraph-properties fo:margin-left="0.5in">
        <style:tab-stops/>
      </style:paragraph-properties>
    </style:style>
    <style:style style:name="P172" style:parent-style-name="Normal" style:family="paragraph">
      <style:text-properties fo:font-weight="bold" style:font-weight-asian="bold" style:font-weight-complex="bold"/>
    </style:style>
    <style:style style:name="P173" style:parent-style-name="Normal" style:list-style-name="LFO36" style:family="paragraph"/>
    <style:style style:name="P174" style:parent-style-name="Normal" style:list-style-name="LFO36" style:family="paragraph"/>
    <style:style style:name="P175" style:parent-style-name="Normal" style:list-style-name="LFO36" style:family="paragraph"/>
    <style:style style:name="P176" style:parent-style-name="Normal" style:list-style-name="LFO36" style:family="paragraph"/>
    <style:style style:name="P177" style:parent-style-name="Normal" style:list-style-name="LFO36" style:family="paragraph"/>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fo:color="#EE0000"/>
    </style:style>
    <style:style style:name="P180" style:parent-style-name="Normal" style:family="paragraph">
      <style:text-properties fo:font-weight="bold" style:font-weight-asian="bold" style:font-weight-complex="bold"/>
    </style:style>
    <style:style style:name="P181" style:parent-style-name="Normal" style:list-style-name="LFO38" style:family="paragraph"/>
    <style:style style:name="P182" style:parent-style-name="Normal" style:list-style-name="LFO38" style:family="paragraph"/>
    <style:style style:name="P183" style:parent-style-name="Normal" style:list-style-name="LFO38" style:family="paragraph"/>
    <style:style style:name="P184" style:parent-style-name="Normal" style:list-style-name="LFO38" style:family="paragraph"/>
    <style:style style:name="P185" style:parent-style-name="Normal" style:list-style-name="LFO38" style:family="paragraph"/>
    <style:style style:name="P186" style:parent-style-name="Normal" style:family="paragraph">
      <style:text-properties fo:font-weight="bold" style:font-weight-asian="bold" style:font-weight-complex="bold"/>
    </style:style>
    <style:style style:name="P187" style:parent-style-name="Normal" style:list-style-name="LFO39" style:family="paragraph"/>
    <style:style style:name="P188" style:parent-style-name="Normal" style:list-style-name="LFO39" style:family="paragraph"/>
    <style:style style:name="P189" style:parent-style-name="Normal" style:list-style-name="LFO39" style:family="paragraph"/>
    <style:style style:name="P190" style:parent-style-name="Normal" style:list-style-name="LFO39" style:family="paragraph"/>
    <style:style style:name="P191" style:parent-style-name="Normal" style:list-style-name="LFO39" style:family="paragraph"/>
    <style:style style:name="P192" style:parent-style-name="Normal" style:family="paragraph">
      <style:paragraph-properties fo:margin-left="0.5in">
        <style:tab-stops/>
      </style:paragraph-properties>
    </style:style>
    <style:style style:name="T193" style:parent-style-name="DefaultParagraphFont" style:family="text">
      <style:text-properties fo:font-weight="bold" style:font-weight-asian="bold" style:font-weight-complex="bold" fo:color="#EE0000"/>
    </style:style>
    <style:style style:name="P194" style:parent-style-name="Normal" style:family="paragraph">
      <style:text-properties fo:font-weight="bold" style:font-weight-asian="bold" style:font-weight-complex="bold"/>
    </style:style>
    <style:style style:name="P195" style:parent-style-name="Normal" style:list-style-name="LFO40" style:family="paragraph"/>
    <style:style style:name="P196" style:parent-style-name="Normal" style:list-style-name="LFO40" style:family="paragraph"/>
    <style:style style:name="P197" style:parent-style-name="Normal" style:list-style-name="LFO40" style:family="paragraph"/>
    <style:style style:name="P198" style:parent-style-name="Normal" style:family="paragraph">
      <style:text-properties fo:font-weight="bold" style:font-weight-asian="bold" style:font-weight-complex="bold"/>
    </style:style>
    <style:style style:name="P199" style:parent-style-name="Normal" style:list-style-name="LFO41" style:family="paragraph"/>
    <style:style style:name="P200" style:parent-style-name="Normal" style:list-style-name="LFO41" style:family="paragraph"/>
    <style:style style:name="P201" style:parent-style-name="Normal" style:list-style-name="LFO41" style:family="paragraph"/>
    <style:style style:name="P202" style:parent-style-name="Normal" style:list-style-name="LFO41" style:family="paragraph"/>
    <style:style style:name="P203" style:parent-style-name="Normal" style:list-style-name="LFO41" style:family="paragraph"/>
    <style:style style:name="P204" style:parent-style-name="Normal" style:list-style-name="LFO41" style:family="paragraph"/>
    <style:style style:name="P205" style:parent-style-name="Normal" style:family="paragraph">
      <style:text-properties fo:font-weight="bold" style:font-weight-asian="bold" style:font-weight-complex="bold"/>
    </style:style>
    <style:style style:name="P206" style:parent-style-name="Normal" style:list-style-name="LFO42" style:family="paragraph"/>
    <style:style style:name="P207" style:parent-style-name="Normal" style:list-style-name="LFO42" style:family="paragraph"/>
    <style:style style:name="P208" style:parent-style-name="Normal" style:list-style-name="LFO42" style:family="paragraph"/>
    <style:style style:name="P209" style:parent-style-name="Normal" style:list-style-name="LFO42" style:family="paragraph"/>
    <style:style style:name="P210" style:parent-style-name="Normal" style:list-style-name="LFO42" style:family="paragraph"/>
    <style:style style:name="P211" style:parent-style-name="Normal" style:family="paragraph">
      <style:text-properties fo:font-weight="bold" style:font-weight-asian="bold" style:font-weight-complex="bold"/>
    </style:style>
    <style:style style:name="P212" style:parent-style-name="Normal" style:list-style-name="LFO43" style:family="paragraph"/>
    <style:style style:name="P213" style:parent-style-name="Normal" style:list-style-name="LFO43" style:family="paragraph"/>
    <style:style style:name="P214" style:parent-style-name="Normal" style:list-style-name="LFO43" style:family="paragraph"/>
    <style:style style:name="P215" style:parent-style-name="Normal" style:list-style-name="LFO43" style:family="paragraph"/>
    <style:style style:name="P216" style:parent-style-name="Normal" style:family="paragraph">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Normal" style:family="paragraph">
      <style:text-properties fo:font-weight="bold" style:font-weight-asian="bold" style:font-weight-complex="bold"/>
    </style:style>
    <style:style style:name="P220" style:parent-style-name="Normal" style:list-style-name="LFO45" style:family="paragraph"/>
    <style:style style:name="P221" style:parent-style-name="Normal" style:list-style-name="LFO45" style:family="paragraph"/>
    <style:style style:name="P222" style:parent-style-name="Normal" style:list-style-name="LFO45" style:family="paragraph"/>
    <style:style style:name="P223" style:parent-style-name="Normal" style:list-style-name="LFO45" style:family="paragraph"/>
    <style:style style:name="P224" style:parent-style-name="Normal" style:family="paragraph">
      <style:text-properties fo:font-weight="bold" style:font-weight-asian="bold" style:font-weight-complex="bold"/>
    </style:style>
    <style:style style:name="P225" style:parent-style-name="Normal" style:list-style-name="LFO46" style:family="paragraph"/>
    <style:style style:name="P226" style:parent-style-name="Normal" style:list-style-name="LFO46" style:family="paragraph"/>
    <style:style style:name="P227" style:parent-style-name="Normal" style:list-style-name="LFO46" style:family="paragraph"/>
    <style:style style:name="P228" style:parent-style-name="Normal" style:list-style-name="LFO46" style:family="paragraph"/>
    <style:style style:name="P229" style:parent-style-name="Normal" style:family="paragraph">
      <style:text-properties fo:font-weight="bold" style:font-weight-asian="bold" style:font-weight-complex="bold"/>
    </style:style>
    <style:style style:name="P230" style:parent-style-name="Normal" style:list-style-name="LFO47" style:family="paragraph"/>
    <style:style style:name="P231" style:parent-style-name="Normal" style:list-style-name="LFO47" style:family="paragraph"/>
    <style:style style:name="P232" style:parent-style-name="Normal" style:list-style-name="LFO47" style:family="paragraph"/>
    <style:style style:name="P233" style:parent-style-name="Normal" style:list-style-name="LFO47" style:family="paragraph"/>
    <style:style style:name="P234" style:parent-style-name="Normal" style:family="paragraph">
      <style:text-properties fo:font-weight="bold" style:font-weight-asian="bold" style:font-weight-complex="bold"/>
    </style:style>
    <style:style style:name="P235" style:parent-style-name="Normal" style:list-style-name="LFO49" style:family="paragraph"/>
    <style:style style:name="P236" style:parent-style-name="Normal" style:list-style-name="LFO49" style:family="paragraph"/>
    <style:style style:name="P237" style:parent-style-name="Normal" style:list-style-name="LFO49" style:family="paragraph"/>
    <style:style style:name="P238" style:parent-style-name="Normal" style:list-style-name="LFO49" style:family="paragraph"/>
    <style:style style:name="P239" style:parent-style-name="Normal" style:list-style-name="LFO49" style:family="paragraph"/>
    <style:style style:name="P240" style:parent-style-name="Normal" style:list-style-name="LFO49" style:family="paragraph"/>
    <style:style style:name="P241" style:parent-style-name="Normal" style:family="paragraph">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P244" style:parent-style-name="Normal" style:family="paragraph">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family="paragraph">
      <style:text-properties fo:font-weight="bold" style:font-weight-asian="bold" style:font-weight-complex="bold"/>
    </style:style>
    <style:style style:name="P247" style:parent-style-name="Normal" style:list-style-name="LFO51" style:family="paragraph"/>
    <style:style style:name="P248" style:parent-style-name="Normal" style:list-style-name="LFO51" style:family="paragraph"/>
    <style:style style:name="P249" style:parent-style-name="Normal" style:list-style-name="LFO51" style:family="paragraph"/>
    <style:style style:name="P250" style:parent-style-name="Normal" style:list-style-name="LFO51" style:family="paragraph"/>
    <style:style style:name="P251" style:parent-style-name="Normal" style:family="paragraph">
      <style:text-properties fo:font-weight="bold" style:font-weight-asian="bold" style:font-weight-complex="bold"/>
    </style:style>
    <style:style style:name="P252" style:parent-style-name="Normal" style:list-style-name="LFO52" style:family="paragraph"/>
    <style:style style:name="P253" style:parent-style-name="Normal" style:list-style-name="LFO52" style:family="paragraph"/>
    <style:style style:name="P254" style:parent-style-name="Normal" style:list-style-name="LFO52" style:family="paragraph"/>
    <style:style style:name="P255" style:parent-style-name="Normal" style:list-style-name="LFO52" style:family="paragraph"/>
    <style:style style:name="P256" style:parent-style-name="Normal" style:list-style-name="LFO52" style:family="paragraph"/>
    <style:style style:name="P257" style:parent-style-name="Normal" style:family="paragraph">
      <style:text-properties fo:font-weight="bold" style:font-weight-asian="bold" style:font-weight-complex="bold"/>
    </style:style>
    <style:style style:name="P258" style:parent-style-name="Normal" style:list-style-name="LFO53" style:family="paragraph"/>
    <style:style style:name="P259" style:parent-style-name="Normal" style:list-style-name="LFO53" style:family="paragraph"/>
    <style:style style:name="P260" style:parent-style-name="Normal" style:list-style-name="LFO53" style:family="paragraph"/>
    <style:style style:name="P261" style:parent-style-name="Normal" style:list-style-name="LFO53" style:family="paragraph"/>
    <style:style style:name="P262" style:parent-style-name="Normal" style:list-style-name="LFO53" style:family="paragraph"/>
    <style:style style:name="P263" style:parent-style-name="Normal" style:family="paragraph">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Normal" style:family="paragraph">
      <style:text-properties fo:font-weight="bold" style:font-weight-asian="bold" style:font-weight-complex="bold" fo:color="#EE0000"/>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text-properties fo:font-weight="bold" style:font-weight-asian="bold" style:font-weight-complex="bold"/>
    </style:style>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P273" style:parent-style-name="Normal" style:list-style-name="LFO58" style:family="paragraph"/>
    <style:style style:name="P274" style:parent-style-name="Normal" style:list-style-name="LFO58" style:family="paragraph"/>
    <style:style style:name="P275" style:parent-style-name="Normal" style:list-style-name="LFO58" style:family="paragraph"/>
    <style:style style:name="P276" style:parent-style-name="Normal" style:list-style-name="LFO58" style:family="paragraph"/>
    <style:style style:name="P277" style:parent-style-name="Normal" style:list-style-name="LFO58" style:family="paragraph"/>
  </office:automatic-styles>
  <office:body>
    <office:text text:use-soft-page-breaks="true">
      <text:p text:style-name="P1">Mājas lapas sadaļu teksti</text:p>
      <text:p text:style-name="P3">Pakalpojumi:</text:p>
      <text:list text:style-name="LFO13" text:continue-numbering="true">
        <text:list-item>
          <text:p text:style-name="P4">Treilera pārvadājumi</text:p>
        </text:list-item>
        <text:list-item>
          <text:p text:style-name="P5">Starptautiskie un vietējie kravu pārvadājumi</text:p>
        </text:list-item>
        <text:list-item>
          <text:p text:style-name="P6">Lielgabarīta kravu pārvadājumi</text:p>
        </text:list-item>
        <text:list-item>
          <text:p text:style-name="P7">Kravu pārvadājumi ar manipulatoru</text:p>
        </text:list-item>
        <text:list-item>
          <text:p text:style-name="P8">Ceļamkrāna un autoceltņa pakalpojumi</text:p>
        </text:list-item>
        <text:list-item>
          <text:p text:style-name="P9">Ekspress piegāde</text:p>
        </text:list-item>
        <text:list-item>
          <text:p text:style-name="P10">Atkritumu apsaimniekošana un konteineru pārvadājumi</text:p>
        </text:list-item>
        <text:list-item>
          <text:p text:style-name="P11">Būvtehnikas pakalpojumi</text:p>
        </text:list-item>
        <text:list-item>
          <text:p text:style-name="P12">Mašīnu un tehnikas transportēšana</text:p>
        </text:list-item>
        <text:list-item>
          <text:p text:style-name="P13">Pavadošais transports</text:p>
        </text:list-item>
        <text:list-item>
          <text:p text:style-name="P14">Noliktavu pakalpojumi<text:s/></text:p>
        </text:list-item>
      </text:list>
      <text:p text:style-name="P15"/>
      <text:p text:style-name="P16">Tehnikas vienības</text:p>
      <text:list text:style-name="LFO56" text:continue-numbering="true">
        <text:list-item>
          <text:p text:style-name="P17">Uzskaitījums pilns? Viņas varbūt var linkot ar konkrētajām pakalpojumu sadaļām?<text:s/></text:p>
        </text:list-item>
        <text:list-item>
          <text:p text:style-name="P18">Varbūt kad atveras sadaļa “tehnikas vienības” un tur ir nevis saraksts, bet bildes + nosaukums kā katalogs?<text:s/></text:p>
        </text:list-item>
      </text:list>
      <text:p text:style-name="P19"/>
      <text:p text:style-name="P20">Realizētie projekti / pieredzes stāsti</text:p>
      <text:p text:style-name="Normal">Te varētu būt kaut kas līdzīgs blogam, bet ļoti īsi, strukturizēti, interesanta informācija + bildes iespaidīgas?</text:p>
      <text:p text:style-name="P21"/>
      <text:p text:style-name="P22">Par mums, kontakti, atsauksmes, sadarbības partneri utt…</text:p>
      <text:p text:style-name="P23">__________________________________________________________</text:p>
      <text:p text:style-name="P24">Noliktavu pakalpojumi<text:s/></text:p>
      <text:p text:style-name="P25">SIA DLL-Transports piedāvā elastīgus un drošus noliktavu risinājumus netālu no Saldus pilsētas, pielāgojoties dažādu uzņēmumu vajadzībām. Pieejama noliktavu īre no 10, 20 un 30 m² līdz pat lielākiem apjomiem gan īstermiņā, gan ilgtermiņā.</text:p>
      <text:p text:style-name="P26">Mūsu noliktavas ir piemērotas dažādu kravu uzglabāšanai un apstrādei, nodrošinot sakārtotu vidi, ērtu piekļuvi un efektīvu kravu plūsmu. Vajadzības gadījumā piedāvājam arī papildu loģistikas un kravu apstrādes pakalpojumus, lai Jūsu uzņēmums varētu strādāt vēl efektīvāk bez nepieciešamības investēt savā noliktavas infrastruktūrā.</text:p>
      <text:p text:style-name="P27">Kāpēc izvēlēties mūsu noliktavu pakalpojumus?</text:p>
      <text:list text:style-name="LFO14" text:continue-numbering="true">
        <text:list-item>
          <text:p text:style-name="P28">Elastīga noliktavu platību noma<text:s/></text:p>
        </text:list-item>
        <text:list-item>
          <text:p text:style-name="P29">Īstermiņa un ilgtermiņa uzglabāšanas iespējas<text:s/></text:p>
        </text:list-item>
        <text:list-item>
          <text:p text:style-name="P30">Diennakts video novērošana<text:s/></text:p>
        </text:list-item>
        <text:list-item>
          <text:p text:style-name="P31">Kontrolēta piekļuve un apsardze<text:s/></text:p>
        </text:list-item>
        <text:list-item>
          <text:p text:style-name="P32">Ugunsdrošības risinājumi<text:s/></text:p>
        </text:list-item>
        <text:list-item>
          <text:p text:style-name="P33">Profesionāla kravu pieņemšana, pārkraušana un apstrāde<text:s/></text:p>
        </text:list-item>
        <text:list-item>
          <text:p text:style-name="P34">Dažādu viedu<text:s/>iekrāvēji<text:s/>gan vieglu, gan<text:s/>smagu un lielgabarīta kravu apstrādei<text:s/></text:p>
        </text:list-item>
        <text:list-item>
          <text:p text:style-name="P35">Pieredzējusi un atbildīga komanda<text:s/></text:p>
        </text:list-item>
      </text:list>
      <text:p text:style-name="P36">Mēs uzņemamies pilnu atbildību par mūsu rīcībā esošo kravu uzglabāšanu un apstrādi. Neatkarīgi no kravas apjoma vai specifikas, preces tiek uzglabātas atbilstošos apstākļos, ievērojot visas drošības un kvalitātes prasības.</text:p>
      <text:p text:style-name="P37">DLL-Transports piedāvā modernas un pilnībā aprīkotas noliktavas dažādu veidu kravu apstrādei Latvijā un Eiropā. Mūsu speciālisti palīdz optimizēt kravu pieņemšanas, uzglabāšanas, komplektēšanas un iekraušanas procesus, nodrošinot uzticamu atbalstu ikdienas loģistikā.</text:p>
      <text:p text:style-name="P38">Mūsdienu loģistikā noliktavu pakalpojumi ir būtiska piegādes ķēdes sastāvdaļa. Neatkarīgi no tā, vai kravu pārvadājumi ir vienkārši vai multimodāli, droša un efektīva kravu uzglabāšana un pārkraušana ir svarīgs priekšnoteikums veiksmīgai piegādei.</text:p>
      <text:p text:style-name="P39"/>
      <text:p text:style-name="P40">Pavadošais transports</text:p>
      <text:p text:style-name="P41">SIA DLL-Transports nodrošina profesionālus pavadošā transporta pakalpojumus lielgabarīta un smagsvara kravu pārvadājumiem Latvijā un Eiropā. Nestandarta kravu transportēšana prasa precīzu plānošanu, pieredzi un augstu atbildības līmeni, tādēļ katrs projekts tiek rūpīgi koordinēts no sākuma līdz galam.</text:p>
      <text:p text:style-name="P42">Mūsu komanda organizē visu nepieciešamo veiksmīgam un drošam pārvadājumam — maršruta plānošanu, atļauju saskaņošanu, satiksmes drošības izvērtēšanu un pavadošā transporta nodrošināšanu atbilstoši normatīvajām prasībām. Vajadzības gadījumā sadarbojamies arī ar atbildīgajām institūcijām un policiju.</text:p>
      <text:p text:style-name="P43">Drošība un kontrole visā maršrutā</text:p>
      <text:p text:style-name="P44">Pavadošais transports ir būtiska drošības sastāvdaļa lielgabarīta kravu pārvadājumos. Tas palīdz:</text:p>
      <text:list text:style-name="LFO15" text:continue-numbering="true">
        <text:list-item>
          <text:p text:style-name="P45">savlaicīgi brīdināt citus satiksmes dalībniekus,<text:s/></text:p>
        </text:list-item>
        <text:list-item>
          <text:p text:style-name="P46">nodrošināt drošu manevrēšanu,<text:s/></text:p>
        </text:list-item>
        <text:list-item>
          <text:p text:style-name="P47">kontrolēt satiksmes plūsmu sarežģītās vietās,<text:s/></text:p>
        </text:list-item>
        <text:list-item>
          <text:p text:style-name="P48">samazināt riskus pārvadājuma laikā,<text:s/></text:p>
        </text:list-item>
        <text:list-item>
          <text:p text:style-name="P49">atvieglot kravas automašīnas vadītāja darbu.<text:s/></text:p>
        </text:list-item>
      </text:list>
      <text:p text:style-name="P50">Mūsdienīgi aprīkots pavadošais transports</text:p>
      <text:p text:style-name="P51">Mūsu pavadošie transportlīdzekļi ir aprīkoti ar:</text:p>
      <text:soft-page-break/>
      <text:list text:style-name="LFO16" text:continue-numbering="true">
        <text:list-item>
          <text:p text:style-name="P52">oranžajām brīdinājuma bākugunīm,<text:s/></text:p>
        </text:list-item>
        <text:list-item>
          <text:p text:style-name="P53">elektroniskajiem informatīvajiem tablo,<text:s/></text:p>
        </text:list-item>
        <text:list-item>
          <text:p text:style-name="P54">radiosakaru sistēmām nepārtrauktai saziņai ar kravas vadītāju,<text:s/></text:p>
        </text:list-item>
        <text:list-item>
          <text:p text:style-name="P55">speciāliem gaismu atstarojošiem apzīmējumiem,<text:s/></text:p>
        </text:list-item>
        <text:list-item>
          <text:p text:style-name="P56">aprīkojumu satiksmes drošības nodrošināšanai dažādās situācijās.<text:s/></text:p>
        </text:list-item>
      </text:list>
      <text:p text:style-name="P57">Tas ļauj operatīvi reaģēt uz situāciju uz ceļa un nodrošināt maksimālu drošību gan kravas transportam, gan citiem satiksmes dalībniekiem.</text:p>
      <text:p text:style-name="P58"/>
      <text:p text:style-name="P59">Profesionāla pieeja katram projektam</text:p>
      <text:p text:style-name="P60">Lielgabarīta pārvadājumi bieži ir sarežģīti loģistikas projekti, kuros svarīga ir precizitāte un pieredze. Mūsu speciālisti izvērtē katru maršrutu, potenciālos riskus un nepieciešamos drošības pasākumus, lai pārvadājums noritētu bez aizkavēšanās un atbilstoši visām prasībām.</text:p>
      <text:p text:style-name="P61">DLL-Transports nodrošina uzticamu un profesionālu pavadošo transportu dažādu izmēru un sarežģītības negabarīta kravu pārvadājumiem, palīdzot klientiem droši realizēt arī sarežģītākos loģistikas projektus.</text:p>
      <text:p text:style-name="Normal"/>
      <text:p text:style-name="P62">Mašīnu un tehnikas transportēšana</text:p>
      <text:p text:style-name="P63">SIA DLL-Transports nodrošina profesionālu automašīnu, smagās tehnikas un specializētā transporta pārvadāšanu Latvijā un visā Eiropā. Piedāvājam drošus, uzticamus un individuāli pielāgotus transportēšanas risinājumus gan uzņēmumiem, gan privātpersonām.</text:p>
      <text:p text:style-name="P64">Mēs transportējam:</text:p>
      <text:list text:style-name="LFO18" text:continue-numbering="true">
        <text:list-item>
          <text:p text:style-name="P65">sedlu vilcējus,<text:s/></text:p>
        </text:list-item>
        <text:list-item>
          <text:p text:style-name="P66">vieglās automašīnas,<text:s/></text:p>
        </text:list-item>
        <text:list-item>
          <text:p text:style-name="P67">lauksaimniecības tehniku,<text:s/></text:p>
        </text:list-item>
        <text:list-item>
          <text:p text:style-name="P68">būvniecības tehniku,<text:s/></text:p>
        </text:list-item>
        <text:list-item>
          <text:p text:style-name="P69">industriālās iekārtas,<text:s/></text:p>
        </text:list-item>
        <text:list-item>
          <text:p text:style-name="P70">nestandarta un specializētu tehniku.<text:s/></text:p>
        </text:list-item>
      </text:list>
      <text:p text:style-name="P71">Atkarībā no kravas specifikas un klienta vajadzībām transportēšana tiek veikta ar tenta piekabēm, treileriem vai specializētiem autovedējiem. Katram pārvadājumam izvēlamies piemērotāko risinājumu, lai nodrošinātu maksimālu drošību, efektivitāti un savlaicīgu piegādi.</text:p>
      <text:p text:style-name="P72"/>
      <text:p text:style-name="P73">Droša un pārdomāta transportēšana</text:p>
      <text:p text:style-name="P74">Automašīnu un tehnikas pārvadāšana prasa rūpīgu plānošanu un profesionālu pieeju. Mūsu komanda nodrošina:</text:p>
      <text:soft-page-break/>
      <text:list text:style-name="LFO19" text:continue-numbering="true">
        <text:list-item>
          <text:p text:style-name="P75">drošu kravas nostiprināšanu,<text:s/></text:p>
        </text:list-item>
        <text:list-item>
          <text:p text:style-name="P76">maršruta plānošanu,<text:s/></text:p>
        </text:list-item>
        <text:list-item>
          <text:p text:style-name="P77">nepieciešamo dokumentu un atļauju saskaņošanu,<text:s/></text:p>
        </text:list-item>
        <text:list-item>
          <text:p text:style-name="P78">precīzu piegādes koordinēšanu,<text:s/></text:p>
        </text:list-item>
        <text:list-item>
          <text:p text:style-name="P79">regulāru komunikāciju visā transportēšanas procesā.<text:s/></text:p>
        </text:list-item>
      </text:list>
      <text:p text:style-name="P80">Neatkarīgi no tehnikas izmēra vai sarežģītības, mēs parūpējamies, lai tā galamērķī nonāktu droši un bez liekiem sarežģījumiem.</text:p>
      <text:p text:style-name="P81"/>
      <text:p text:style-name="P82">Individuāli risinājumi katram klientam</text:p>
      <text:p text:style-name="P83">Katrs pārvadājums ir atšķirīgs, tādēļ piedāvājam elastīgus risinājumus atbilstoši Jūsu vajadzībām un termiņiem. Mūsu pieredze starptautiskajos pārvadājumos ļauj nodrošināt kvalitatīvu servisu gan vietējos, gan starptautiskos maršrutos.</text:p>
      <text:p text:style-name="P84">Ja Jūs interesē automašīnu vai tehnikas transportēšana un vēlaties saņemt konsultāciju, aicinām izmantot pogu<text:s/><text:span text:style-name="T85">“Saņemt konsultāciju”</text:span><text:s/>lapas apakšā — ar prieku palīdzēsim atrast piemērotāko risinājumu Jūsu kravas transportēšanai.</text:p>
      <text:p text:style-name="Normal"/>
      <text:p text:style-name="P86">BŪVTEHNIKAS PAKALPOJUMI</text:p>
      <text:p text:style-name="P87">SIA DLL-Transports piedāvā profesionālus būvtehnikas pakalpojumus dažāda apjoma zemes darbiem, teritoriju labiekārtošanai un būvniecības projektiem. Nodrošinām uzticamu tehniku, pieredzējušus operatorus un elastīgus risinājumus gan uzņēmumiem, gan privātpersonām.</text:p>
      <text:p text:style-name="P88"/>
      <text:p text:style-name="P89">Ekskavatora pakalpojumi</text:p>
      <text:p text:style-name="P90">Piedāvājam ekskavatora pakalpojumus:</text:p>
      <text:list text:style-name="LFO21" text:continue-numbering="true">
        <text:list-item>
          <text:p text:style-name="P91">rakšanas darbiem,<text:s/></text:p>
        </text:list-item>
        <text:list-item>
          <text:p text:style-name="P92">teritoriju planēšanai,<text:s/></text:p>
        </text:list-item>
        <text:list-item>
          <text:p text:style-name="P93">grāvju un pamatu rakšanai,<text:s/></text:p>
        </text:list-item>
        <text:list-item>
          <text:p text:style-name="P94">būvlaukumu sagatavošanai,<text:s/></text:p>
        </text:list-item>
        <text:list-item>
          <text:p text:style-name="P95">ceļu un laukumu izbūves darbiem.<text:s/></text:p>
        </text:list-item>
      </text:list>
      <text:p text:style-name="P96">Ekskavators aprīkots ar:</text:p>
      <text:list text:style-name="LFO22" text:continue-numbering="true">
        <text:list-item>
          <text:p text:style-name="P97">3 dažāda izmēra rakšanas kausiem,<text:s/></text:p>
        </text:list-item>
        <text:list-item>
          <text:p text:style-name="P98">planējamo kausu (1,50 m plats),<text:s/></text:p>
        </text:list-item>
        <text:list-item>
          <text:p text:style-name="P99">sniega lāpstu sezonas darbiem.<text:s/></text:p>
        </text:list-item>
      </text:list>
      <text:p text:style-name="P100"/>
      <text:soft-page-break/>
      <text:p text:style-name="P101">Nodrošinām arī tehnikas piegādi uz objektu visā Latvijā.</text:p>
      <text:p text:style-name="P102"/>
      <text:p text:style-name="P103">Konteineru noma būvgružiem un saimnieciskajiem atkritumiem</text:p>
      <text:p text:style-name="P104">Piedāvājam konteinerus:</text:p>
      <text:list text:style-name="LFO23" text:continue-numbering="true">
        <text:list-item>
          <text:p text:style-name="P105">būvgružiem,<text:s/></text:p>
        </text:list-item>
        <text:list-item>
          <text:p text:style-name="P106">demontāžas atkritumiem,<text:s/></text:p>
        </text:list-item>
        <text:list-item>
          <text:p text:style-name="P107">teritoriju uzkopšanas darbiem,<text:s/></text:p>
        </text:list-item>
        <text:list-item>
          <text:p text:style-name="P108">dažādiem saimnieciskajiem atkritumiem.<text:s/></text:p>
        </text:list-item>
      </text:list>
      <text:p text:style-name="P109">Pieejamie konteineru tilpumi:</text:p>
      <text:list text:style-name="LFO24" text:continue-numbering="true">
        <text:list-item>
          <text:p text:style-name="P110">16 m³<text:s/></text:p>
        </text:list-item>
        <text:list-item>
          <text:p text:style-name="P111">22 m³<text:s/></text:p>
        </text:list-item>
        <text:list-item>
          <text:p text:style-name="P112">35 m³<text:s/></text:p>
        </text:list-item>
      </text:list>
      <text:p text:style-name="Normal">Nodrošinām konteineru piegādi, novietošanu un izvešanu atbilstoši Jūsu projekta vajadzībām.</text:p>
      <text:p text:style-name="Normal"/>
      <text:p text:style-name="P113">Atkritumu apsaimniekošana un konteineru pārvadājumi</text:p>
      <text:p text:style-name="P114">SIA DLL-Transports nodrošina profesionālus atkritumu apsaimniekošanas un konteineru pārvadāšanas pakalpojumus Latvijā un Baltijas valstīs. Piedāvājam drošus, normatīviem atbilstošus risinājumus būvniecības, rūpniecības un saimniecisko atkritumu loģistikai.</text:p>
      <text:p text:style-name="P115">Mūsu pieeja balstās uz atbildīgu atkritumu apriti, precīzu dokumentācijas nodrošināšanu un efektīvu loģistikas organizēšanu, lai klientiem nodrošinātu vienkāršu un kontrolētu procesu no izvešanas līdz utilizācijai vai pārstrādei.</text:p>
      <text:p text:style-name="P116"/>
      <text:p text:style-name="P117">Konteineru noma un pārvadājumi</text:p>
      <text:p text:style-name="P118">Nodrošinām konteineru piegādi, novietošanu un izvešanu atbilstoši projekta vajadzībām:</text:p>
      <text:list text:style-name="LFO54" text:continue-numbering="true">
        <text:list-item>
          <text:p text:style-name="P119">16 m³ konteineri<text:s/></text:p>
        </text:list-item>
        <text:list-item>
          <text:p text:style-name="P120">22 m³ konteineri<text:s/></text:p>
        </text:list-item>
        <text:list-item>
          <text:p text:style-name="P121">35 m³ konteineri<text:s/></text:p>
        </text:list-item>
      </text:list>
      <text:p text:style-name="P122">Konteineri piemēroti:</text:p>
      <text:list text:style-name="LFO55" text:continue-numbering="true">
        <text:list-item>
          <text:p text:style-name="P123">būvgružiem un demontāžas atkritumiem<text:s/></text:p>
        </text:list-item>
        <text:list-item>
          <text:p text:style-name="P124">rūpnieciskajiem atkritumiem un izejvielām<text:s/></text:p>
        </text:list-item>
        <text:list-item>
          <text:p text:style-name="P125">teritoriju tīrīšanas un labiekārtošanas darbiem<text:s/></text:p>
        </text:list-item>
        <text:list-item>
          <text:p text:style-name="P126">dažādu veidu saimnieciskajiem atkritumiem<text:s/></text:p>
        </text:list-item>
      </text:list>
      <text:soft-page-break/>
      <text:p text:style-name="P127">Veicam arī konteineru pārvadājumus Latvijā un Baltijā, nodrošinot operatīvu piegādi un savākšanu.</text:p>
      <text:p text:style-name="P128"/>
      <text:p text:style-name="P129">Atbildīga atkritumu apsaimniekošana</text:p>
      <text:p text:style-name="P130">Atkritumu pārvadāšana tiek veikta atbilstoši spēkā esošajiem normatīvajiem aktiem, nodrošinot nepieciešamo dokumentāciju un izsekojamību visā procesā.</text:p>
      <text:p text:style-name="P131">Lai saņemtu atkritumu pārvadāšanas pakalpojumus, nepieciešams noslēgt sadarbības līgumu ar mūsu uzņēmumu.</text:p>
      <text:p text:style-name="P132"/>
      <text:p text:style-name="P133">Profesionāla un kontrolēta loģistika</text:p>
      <text:p text:style-name="P134">DLL-Transports nodrošina uzticamu un operatīvu pieeju atkritumu un konteineru loģistikai, palīdzot klientiem optimizēt būvniecības un industriālos procesus, samazināt izmaksas un nodrošināt sakārtotu atkritumu apriti.</text:p>
      <text:p text:style-name="P135"/>
      <text:p text:style-name="P136">Ekspress kravu pārvadājumi</text:p>
      <text:p text:style-name="Normal">SIA DLL-Transports nodrošina profesionālus ekspress kravu pārvadājumus Latvijā un visā Eiropā. Piedāvājam ātrus, drošus un tiešus kravu piegādes risinājumus uzņēmumiem un privātpersonām, kad svarīgākais ir piegādes ātrums un precizitāte.</text:p>
      <text:p text:style-name="Normal">Ekspress kravu piegāde ir paredzēta steidzamiem sūtījumiem, kur kavēšanās nav pieļaujama un nepieciešama nepārtraukta loģistikas kontrole. Krava tiek transportēta tiešajā režīmā no nosūtītāja līdz saņēmējam, maksimāli samazinot apstāšanās un pārkraušanas riskus.</text:p>
      <text:p text:style-name="P137">Ekspress piegādes priekšrocības</text:p>
      <text:list text:style-name="LFO26" text:continue-numbering="true">
        <text:list-item>
          <text:p text:style-name="P138">Steidzama kravu piegāde Latvijā un Eiropas Savienībā<text:s/></text:p>
        </text:list-item>
        <text:list-item>
          <text:p text:style-name="P139">Tiešie kravu pārvadājumi bez liekas pārkraušanas<text:s/></text:p>
        </text:list-item>
        <text:list-item>
          <text:p text:style-name="P140">Individuāli loģistikas risinājumi katram sūtījumam<text:s/></text:p>
        </text:list-item>
        <text:list-item>
          <text:p text:style-name="P141">Precīza piegādes termiņu ievērošana<text:s/></text:p>
        </text:list-item>
        <text:list-item>
          <text:p text:style-name="P142">Droša kravas transportēšana visā maršrutā<text:s/></text:p>
        </text:list-item>
        <text:list-item>
          <text:p text:style-name="P143">Operatīva maršruta plānošana un izpilde<text:s/></text:p>
        </text:list-item>
      </text:list>
      <text:p text:style-name="P144"/>
      <text:p text:style-name="P145">Kad izvēlēties ekspress kravu pārvadājumus?</text:p>
      <text:p text:style-name="Normal">Ekspress loģistika ir ideāla izvēle, ja nepieciešama:</text:p>
      <text:list text:style-name="LFO27" text:continue-numbering="true">
        <text:list-item>
          <text:p text:style-name="P146">steidzama komerckravu piegāde,<text:s/></text:p>
        </text:list-item>
        <text:list-item>
          <text:p text:style-name="P147">ražošanas procesu nepārtrauktība,<text:s/></text:p>
        </text:list-item>
        <text:list-item>
          <text:p text:style-name="P148">augstas vērtības vai jutīgu kravu transportēšana,<text:s/></text:p>
        </text:list-item>
        <text:list-item>
          <text:p text:style-name="P149">ātra preču piegāde starptautiskajos maršrutos.<text:s/></text:p>
        </text:list-item>
      </text:list>
      <text:p text:style-name="P150"/>
      <text:p text:style-name="P151">Ekspress loģistika Latvijā un Eiropā</text:p>
      <text:p text:style-name="Normal">Mūsu ekspress kravu pārvadājumi aptver Latviju un visas Eiropas Savienības valstis. Katram sūtījumam tiek piemeklēts optimāls maršruts un transporta risinājums, lai nodrošinātu ātrāko iespējamo piegādi ar maksimālu drošību.</text:p>
      <text:p text:style-name="Normal"/>
      <text:p text:style-name="Normal"/>
      <text:p text:style-name="P152">Ceļamkrāna un autoceltņa pakalpojumi</text:p>
      <text:p text:style-name="Normal">SIA DLL-Transports piedāvā profesionālus autoceltņu un ceļamkrānu pakalpojumus smagu, lielgabarīta un nestandarta kravu pacelšanai, iekraušanai un pārvietošanai Latvijā un Eiropā. Nodrošinām drošu un precīzu tehnikas izmantošanu būvniecības, industriālajos un loģistikas projektos.</text:p>
      <text:p text:style-name="Normal">Mūsu autoceltņu risinājumi ir piemēroti dažādu kravu montāžai, pārvietošanai un uzstādīšanai sarežģītos objektos, kur nepieciešama augsta precizitāte un celtspēja.</text:p>
      <text:p text:style-name="Normal"/>
      <text:p text:style-name="P153">Autoceltnis MAN</text:p>
      <text:list text:style-name="LFO34" text:continue-numbering="true">
        <text:list-item>
          <text:p text:style-name="P154">Celtspēja: no 13 500 kg līdz 3 200 kg (atkarībā no izlices garuma)<text:s/></text:p>
        </text:list-item>
        <text:list-item>
          <text:p text:style-name="P155">Celtņa izlices garums: 14,3 m<text:s/></text:p>
        </text:list-item>
        <text:list-item>
          <text:p text:style-name="P156">Platformas izmērs: 2,50 m × 6,50 m<text:s/></text:p>
        </text:list-item>
        <text:list-item>
          <text:p text:style-name="P157">Piekabes izmērs: 2,50 m × 7,50 m<text:s/></text:p>
        </text:list-item>
        <text:list-item>
          <text:p text:style-name="P158">Platformas augstums no zemes: 1,50 m<text:s/></text:p>
        </text:list-item>
        <text:list-item>
          <text:p text:style-name="P159">Piekabes augstums: 0,80 m<text:s/></text:p>
        </text:list-item>
      </text:list>
      <text:p text:style-name="Normal"/>
      <text:p text:style-name="P160">Autoceltnis SCANIA</text:p>
      <text:list text:style-name="LFO35" text:continue-numbering="true">
        <text:list-item>
          <text:p text:style-name="P161">Celtspēja: no 22 000 kg līdz 4 300 kg (atkarībā no izlices garuma)<text:s/></text:p>
        </text:list-item>
        <text:list-item>
          <text:p text:style-name="P162">Celtņa izlices garums: līdz<text:s/>17<text:s/>m<text:s/></text:p>
        </text:list-item>
        <text:list-item>
          <text:p text:style-name="P163">Platformas izmērs: 2,50 m × 6,50 m<text:s/></text:p>
        </text:list-item>
        <text:list-item>
          <text:p text:style-name="P164">Piekabes izmērs: 2,50 m × 7,50 m<text:s/></text:p>
        </text:list-item>
        <text:list-item>
          <text:p text:style-name="P165">Platformas augstums no zemes: 1,06 m<text:s/></text:p>
        </text:list-item>
        <text:list-item>
          <text:p text:style-name="P166">Piekabes augstums: 0,80 m<text:s/></text:p>
        </text:list-item>
      </text:list>
      <text:p text:style-name="Normal"/>
      <text:p text:style-name="P167">Autoceltnim SCANIA iespējams pievienot pagarinājumu</text:p>
      <text:soft-page-break/>
      <text:p text:style-name="P168">Autoceltnis SCANIA<text:s/>+<text:s/>JIB HABIH</text:p>
      <text:list text:style-name="LFO35" text:continue-numbering="true">
        <text:list-item>
          <text:p text:style-name="P169">Celtspēja: no<text:s/>4 300<text:s/>kg līdz<text:s/>1 500<text:s/>kg (atkarībā no izlices garuma)<text:s/></text:p>
        </text:list-item>
        <text:list-item>
          <text:p text:style-name="P170">Celtņa izlices garums:<text:s/>no<text:s/>17<text:s/><text:s/>līdz 26<text:s/>m<text:s/></text:p>
        </text:list-item>
      </text:list>
      <text:p text:style-name="P171"/>
      <text:p text:style-name="P172">Droši un precīzi celšanas darbi</text:p>
      <text:p text:style-name="Normal">Mūsu autoceltņu pakalpojumi nodrošina:</text:p>
      <text:list text:style-name="LFO36" text:continue-numbering="true">
        <text:list-item>
          <text:p text:style-name="P173">smagu kravu pacelšanu un montāžu,<text:s/></text:p>
        </text:list-item>
        <text:list-item>
          <text:p text:style-name="P174">būvmateriālu un konstrukciju uzstādīšanu,<text:s/></text:p>
        </text:list-item>
        <text:list-item>
          <text:p text:style-name="P175">industriālo iekārtu pārvietošanu,<text:s/></text:p>
        </text:list-item>
        <text:list-item>
          <text:p text:style-name="P176">precīzu darbu izpildi sarežģītos objektos,<text:s/></text:p>
        </text:list-item>
        <text:list-item>
          <text:p text:style-name="P177">drošu tehnikas darbību pieredzējušu operatoru vadībā.<text:s/></text:p>
        </text:list-item>
      </text:list>
      <text:p text:style-name="Normal">Katrs projekts tiek izvērtēts individuāli, lai nodrošinātu maksimālu drošību, efektivitāti un optimālu tehnikas pielietojumu.</text:p>
      <text:p text:style-name="Normal"/>
      <text:p text:style-name="P178">Autoceltņu pakalpojumi Latvijā un Eiropā</text:p>
      <text:p text:style-name="Normal">Nodrošinām autoceltņu un ceļamkrānu pakalpojumus dažādu nozaru klientiem Latvijā un Eiropas Savienībā, piedāvājot uzticamu risinājumu sarežģītiem pacelšanas un montāžas darbiem.</text:p>
      <text:p text:style-name="Normal"/>
      <text:p text:style-name="P179">Kravu pārvadājumi ar manipulatoru</text:p>
      <text:p text:style-name="Normal">SIA DLL-Transports nodrošina profesionālus kravu pārvadājumus ar manipulatoru Latvijā un Eiropā. Šis ir efektīvs “divi vienā” loģistikas risinājums, kas apvieno kravas transportēšanu un precīzu izkraušanu objektā, izmantojot hidraulisko manipulatoru.</text:p>
      <text:p text:style-name="Normal">Pakalpojums ir īpaši piemērots būvniecības, industriālajiem un komerciālajiem projektiem, kur svarīga ir ātra piegāde un kravas novietošana tieši nepieciešamajā vietā bez papildu tehnikas iesaistes.</text:p>
      <text:p text:style-name="P180">Ko mēs pārvadājam ar manipulatoru</text:p>
      <text:list text:style-name="LFO38" text:continue-numbering="true">
        <text:list-item>
          <text:p text:style-name="P181">paletizētus būvmateriālus<text:s/></text:p>
        </text:list-item>
        <text:list-item>
          <text:p text:style-name="P182">jumta segumus un konstrukciju elementus<text:s/></text:p>
        </text:list-item>
        <text:list-item>
          <text:p text:style-name="P183">metāla un industriālās iekārtas<text:s/></text:p>
        </text:list-item>
        <text:list-item>
          <text:p text:style-name="P184">koka materiālus, žogus un paneļus<text:s/></text:p>
        </text:list-item>
        <text:list-item>
          <text:p text:style-name="P185">dažādas smagas un nestandarta paletes<text:s/></text:p>
        </text:list-item>
      </text:list>
      <text:p text:style-name="P186">Manipulatora pakalpojuma priekšrocības</text:p>
      <text:soft-page-break/>
      <text:list text:style-name="LFO39" text:continue-numbering="true">
        <text:list-item>
          <text:p text:style-name="P187">kravas piegāde un izkraušana vienā procesā<text:s/></text:p>
        </text:list-item>
        <text:list-item>
          <text:p text:style-name="P188">precīza kravas novietošana objektā<text:s/></text:p>
        </text:list-item>
        <text:list-item>
          <text:p text:style-name="P189">nav nepieciešama papildu celšanas tehnika<text:s/></text:p>
        </text:list-item>
        <text:list-item>
          <text:p text:style-name="P190">ātrāka loģistika un mazākas izmaksas<text:s/></text:p>
        </text:list-item>
        <text:list-item>
          <text:p text:style-name="P191">piemērots grūti pieejamām vietām</text:p>
        </text:list-item>
      </text:list>
      <text:p text:style-name="P192"/>
      <text:p text:style-name="Normal"><text:span text:style-name="T193">Lielgabarīta un negabarīta kravu pārvadājumi Eiropā un Latvijā</text:span></text:p>
      <text:p text:style-name="Normal">SIA DLL-Transports nodrošina profesionālus lielgabarīta un negabarīta kravu pārvadājumus Latvijā un visā Eiropā. Piedāvājam pilna cikla loģistikas risinājumus — no inženiertehniskās sagatavošanas un atļauju noformēšanas līdz pavadošajam transportam un drošai piegādei galamērķī.</text:p>
      <text:p text:style-name="Normal">Lielgabarīta kravu pārvadājumi ir sarežģīti loģistikas projekti, kuriem nepieciešama precīza plānošana, specializēta tehnika un pieredzējusi komanda, lai nodrošinātu drošu un kontrolētu kravas kustību visā maršrutā.</text:p>
      <text:p text:style-name="Normal"/>
      <text:p text:style-name="P194">Specializēta tehnika smagsvara pārvadājumiem</text:p>
      <text:p text:style-name="Normal">Mūsu autoparks ir aprīkots lielgabarīta kravu pārvadājumiem:</text:p>
      <text:list text:style-name="LFO40" text:continue-numbering="true">
        <text:list-item>
          <text:p text:style-name="P195">garuma maiņas treileri ar kraušanas augstumu 300–450 mm, celtspēju līdz 45 t<text:s/></text:p>
        </text:list-item>
        <text:list-item>
          <text:p text:style-name="P196">garuma maiņas treileri ar kraušanas augstumu 850–920 mm, celtspēju līdz 45 t<text:s/></text:p>
        </text:list-item>
        <text:list-item>
          <text:p text:style-name="P197">pagarināmas platformas līdz 20 m kravas garumam<text:s/></text:p>
        </text:list-item>
      </text:list>
      <text:p text:style-name="Normal">Šī tehnika ļauj efektīvi un droši transportēt gan industriālas iekārtas, gan nestandarta izmēra smagsvara kravas.</text:p>
      <text:p text:style-name="Normal"/>
      <text:p text:style-name="P198">Pilna servisa projektu loģistika</text:p>
      <text:p text:style-name="Normal">Nodrošinām pilnu pārvadājuma vadību no sākuma līdz beigām:</text:p>
      <text:list text:style-name="LFO41" text:continue-numbering="true">
        <text:list-item>
          <text:p text:style-name="P199">inženiertehniskā pārvadājuma sagatavošana<text:s/></text:p>
        </text:list-item>
        <text:list-item>
          <text:p text:style-name="P200">optimāla maršruta plānošana un risku izvērtēšana<text:s/></text:p>
        </text:list-item>
        <text:list-item>
          <text:p text:style-name="P201">iekraušanas un izkraušanas procesu organizēšana<text:s/></text:p>
        </text:list-item>
        <text:list-item>
          <text:p text:style-name="P202">pavadošā transporta nodrošināšana<text:s/></text:p>
        </text:list-item>
        <text:list-item>
          <text:p text:style-name="P203">policijas eskorta saskaņošana, ja tas nepieciešams<text:s/></text:p>
        </text:list-item>
        <text:list-item>
          <text:p text:style-name="P204">visu atļauju un dokumentācijas noformēšana<text:s/></text:p>
        </text:list-item>
      </text:list>
      <text:p text:style-name="Normal">Katrs projekts tiek vadīts kā individuāls loģistikas risinājums ar maksimālu precizitāti un kontroli.</text:p>
      <text:soft-page-break/>
      <text:p text:style-name="P205">Kravas, ko pārvadājam</text:p>
      <text:list text:style-name="LFO42" text:continue-numbering="true">
        <text:list-item>
          <text:p text:style-name="P206">industriālās iekārtas un ražošanas līnijas<text:s/></text:p>
        </text:list-item>
        <text:list-item>
          <text:p text:style-name="P207">lauksaimniecības tehnika (traktori, kombaini)<text:s/></text:p>
        </text:list-item>
        <text:list-item>
          <text:p text:style-name="P208">smagais un speciālais transports<text:s/></text:p>
        </text:list-item>
        <text:list-item>
          <text:p text:style-name="P209">būvniecības un metāla konstrukcijas<text:s/></text:p>
        </text:list-item>
        <text:list-item>
          <text:p text:style-name="P210">nestandarta un oversized kravas<text:s/></text:p>
        </text:list-item>
      </text:list>
      <text:p text:style-name="Normal">Veicam pārvadājumus gan Latvijā, gan starptautiskajos Eiropas maršrutos.</text:p>
      <text:p text:style-name="Normal"/>
      <text:p text:style-name="P211">Kompleksa loģistika un operatīvā vadība</text:p>
      <text:p text:style-name="Normal">Nodrošinām pilna spektra loģistikas atbalstu:</text:p>
      <text:list text:style-name="LFO43" text:continue-numbering="true">
        <text:list-item>
          <text:p text:style-name="P212">kravu pavaddokumentu sagatavošana un pārvaldība<text:s/></text:p>
        </text:list-item>
        <text:list-item>
          <text:p text:style-name="P213">ekspeditēšana un loģistikas koordinēšana<text:s/></text:p>
        </text:list-item>
        <text:list-item>
          <text:p text:style-name="P214">pārvadājuma un pavadības organizēšana<text:s/></text:p>
        </text:list-item>
        <text:list-item>
          <text:p text:style-name="P215">maršruta uzraudzība un projekta kontrole reāllaikā<text:s/></text:p>
        </text:list-item>
      </text:list>
      <text:p text:style-name="Normal"/>
      <text:p text:style-name="P216">Premium pieeja smagsvara loģistikai</text:p>
      <text:p text:style-name="Normal">Katrs lielgabarīta pārvadājums tiek plānots kā augstas precizitātes projekts, kurā svarīga ir drošība, efektivitāte un prognozējams izpildes laiks. Mūsu mērķis ir nodrošināt, lai pat vissarežģītākās kravas tiktu piegādātas droši, savlaicīgi un bez riskiem.</text:p>
      <text:p text:style-name="Normal"/>
      <text:p text:style-name="P217">Starptautiskie un vietējie kravu pārvadājumi Latvijā un Eiropā</text:p>
      <text:p text:style-name="Normal">SIA DLL-Transports nodrošina profesionālus kravu pārvadājumus Latvijā, Baltijas valstīs un visā Eiropā. Piedāvājam pilna servisa loģistikas risinājumus uzņēmumiem un privātpersonām — no vietējiem pārvadājumiem līdz kompleksiem starptautiskiem loģistikas projektiem.</text:p>
      <text:p text:style-name="Normal">Mūsu galvenais fokuss ir<text:s/><text:span text:style-name="T218">droša, savlaicīga un efektīva kravu piegāde</text:span>, neatkarīgi no kravas veida, apjoma vai galamērķa.</text:p>
      <text:p text:style-name="Normal"/>
      <text:p text:style-name="P219">Kravu pārvadājumi Latvijā</text:p>
      <text:p text:style-name="Normal">Nodrošinām operatīvus un uzticamus kravu pārvadājumus visā Latvijas teritorijā. Katrs pārvadājums tiek pielāgots klienta vajadzībām, nodrošinot ātru izpildi un precīzu loģistikas plānošanu.</text:p>
      <text:p text:style-name="Normal">Pakalpojumi ietver:</text:p>
      <text:list text:style-name="LFO45" text:continue-numbering="true">
        <text:list-item>
          <text:p text:style-name="P220">pilnu un salikto kravu pārvadājumus (FTL / LTL)<text:s/></text:p>
        </text:list-item>
        <text:list-item>
          <text:p text:style-name="P221">beramo kravu transportēšanu<text:s/></text:p>
        </text:list-item>
        <text:list-item>
          <text:p text:style-name="P222">vietējo maršrutu loģistiku<text:s/></text:p>
        </text:list-item>
        <text:list-item>
          <text:p text:style-name="P223">ekspress piegādes risinājumus<text:s/></text:p>
        </text:list-item>
      </text:list>
      <text:p text:style-name="Normal"/>
      <text:p text:style-name="P224">Starptautiskie kravu pārvadājumi Eiropā</text:p>
      <text:p text:style-name="Normal">Veicam regulārus kravu pārvadājumus uz un no Eiropas Savienības valstīm, nodrošinot stabilu un prognozējamu loģistikas ķēdi.</text:p>
      <text:p text:style-name="Normal">Piedāvājam:</text:p>
      <text:list text:style-name="LFO46" text:continue-numbering="true">
        <text:list-item>
          <text:p text:style-name="P225">starptautiskos FTL un LTL pārvadājumus<text:s/></text:p>
        </text:list-item>
        <text:list-item>
          <text:p text:style-name="P226">kravu piegādes no durvīm līdz durvīm<text:s/></text:p>
        </text:list-item>
        <text:list-item>
          <text:p text:style-name="P227">maršrutu optimizāciju un ekspeditēšanu<text:s/></text:p>
        </text:list-item>
        <text:list-item>
          <text:p text:style-name="P228">kravu dokumentācijas un loģistikas koordinēšanu<text:s/></text:p>
        </text:list-item>
      </text:list>
      <text:p text:style-name="Normal">Mūsu pieredze Eiropas maršrutos ļauj nodrošināt konkurētspējīgus piegādes termiņus un augstu servisa kvalitāti.</text:p>
      <text:p text:style-name="Normal"/>
      <text:p text:style-name="P229">Kravu pārkraušana un uzglabāšana</text:p>
      <text:p text:style-name="Normal">Papildus transportam piedāvājam arī kravu loģistikas atbalstu:</text:p>
      <text:list text:style-name="LFO47" text:continue-numbering="true">
        <text:list-item>
          <text:p text:style-name="P230">kravu pārkraušana<text:s/></text:p>
        </text:list-item>
        <text:list-item>
          <text:p text:style-name="P231">īstermiņa un ilgtermiņa uzglabāšana<text:s/></text:p>
        </text:list-item>
        <text:list-item>
          <text:p text:style-name="P232">kravu konsolidācija un sadalīšana<text:s/></text:p>
        </text:list-item>
        <text:list-item>
          <text:p text:style-name="P233">loģistikas plūsmu organizēšana<text:s/></text:p>
        </text:list-item>
      </text:list>
      <text:p text:style-name="Normal">Tas ļauj klientiem optimizēt piegādes ķēdi un samazināt izmaksas.</text:p>
      <text:p text:style-name="Normal"/>
      <text:p text:style-name="P234">Kravu veidi, ko pārvadājam</text:p>
      <text:p text:style-name="Normal">Mēs transportējam plašu kravu spektru:</text:p>
      <text:list text:style-name="LFO49" text:continue-numbering="true">
        <text:list-item>
          <text:p text:style-name="P235">pilnas kravas (FTL)<text:s/></text:p>
        </text:list-item>
        <text:list-item>
          <text:p text:style-name="P236">saliktas kravas (LTL)<text:s/></text:p>
        </text:list-item>
        <text:list-item>
          <text:p text:style-name="P237">beramās kravas (smiltis, grants, graudi)<text:s/></text:p>
        </text:list-item>
        <text:list-item>
          <text:p text:style-name="P238">ADR bīstamās kravas<text:s/></text:p>
        </text:list-item>
        <text:list-item>
          <text:p text:style-name="P239">lielgabarīta un nestandarta kravas<text:s/></text:p>
        </text:list-item>
        <text:list-item>
          <text:p text:style-name="P240">paletizētas un nestandarta iepakotas kravas<text:s/></text:p>
        </text:list-item>
      </text:list>
      <text:p text:style-name="Normal"/>
      <text:soft-page-break/>
      <text:p text:style-name="P241">Premium loģistikas pieeja</text:p>
      <text:p text:style-name="Normal">Katrs pārvadājums tiek plānots individuāli, ņemot vērā kravas specifiku, maršrutu un piegādes termiņus. Mūsu mērķis ir nodrošināt<text:s/><text:span text:style-name="T242">maksimālu drošību, precizitāti un efektivitāti</text:span>, vienlaikus optimizējot klienta loģistikas izmaksas.</text:p>
      <text:p text:style-name="P243"/>
      <text:p text:style-name="P244">Treilera pakalpojumi (treilera pārvadājumi Latvijā un Eiropā)</text:p>
      <text:p text:style-name="Normal">SIA DLL-Transports nodrošina profesionālus treilera pārvadājumus Latvijā, Baltijas valstīs un visā Eiropā. Piedāvājam drošus un pielāgotus risinājumus dažādu izmēru, svara un specifikas kravu transportēšanai — sākot no lauksaimniecības tehnikas līdz smagsvara un nestandarta kravām.</text:p>
      <text:p text:style-name="Normal">Mūsu treilera pakalpojumi ir izstrādāti, lai nodrošinātu<text:s/><text:span text:style-name="T245">maksimālu drošību, precizitāti un efektīvu loģistikas izpildi</text:span><text:s/>pat sarežģītākajos pārvadājumos.</text:p>
      <text:p text:style-name="Normal"/>
      <text:p text:style-name="P246">Treilera pārvadājumu risinājumi</text:p>
      <text:p text:style-name="Normal">Piedāvājam dažāda tipa treileru pārvadājumus, pielāgojoties kravas specifikai:</text:p>
      <text:list text:style-name="LFO51" text:continue-numbering="true">
        <text:list-item>
          <text:p text:style-name="P247">zemās grīdas (lowbed) treileri smagsvara kravām<text:s/></text:p>
        </text:list-item>
        <text:list-item>
          <text:p text:style-name="P248">teleskopiskie un pagarināmie treileri garām kravām<text:s/></text:p>
        </text:list-item>
        <text:list-item>
          <text:p text:style-name="P249">mega un standarta treileri industriālām un tehnikas kravām<text:s/></text:p>
        </text:list-item>
        <text:list-item>
          <text:p text:style-name="P250">specializēti risinājumi nestandarta kravu transportēšanai<text:s/></text:p>
        </text:list-item>
      </text:list>
      <text:p text:style-name="Normal">Šī tehnika ļauj droši un efektīvi pārvadāt gan smagas, gan lielgabarīta kravas ar optimālu stabilitāti un kontroli.</text:p>
      <text:p text:style-name="Normal"/>
      <text:p text:style-name="P251">Ko mēs pārvadājam ar treileriem</text:p>
      <text:list text:style-name="LFO52" text:continue-numbering="true">
        <text:list-item>
          <text:p text:style-name="P252">lauksaimniecības tehniku (traktori, kombaini)<text:s/></text:p>
        </text:list-item>
        <text:list-item>
          <text:p text:style-name="P253">industriālās un ražošanas iekārtas<text:s/></text:p>
        </text:list-item>
        <text:list-item>
          <text:p text:style-name="P254">būvniecības tehniku un smago transportu<text:s/></text:p>
        </text:list-item>
        <text:list-item>
          <text:p text:style-name="P255">lielgabarīta un nestandarta konstrukcijas<text:s/></text:p>
        </text:list-item>
        <text:list-item>
          <text:p text:style-name="P256">palielināta apjoma un smagsvara kravas<text:s/></text:p>
        </text:list-item>
      </text:list>
      <text:p text:style-name="Normal">Veicam pārvadājumus gan Latvijā, gan starptautiskajos Eiropas maršrutos.</text:p>
      <text:p text:style-name="Normal"/>
      <text:p text:style-name="P257">Pilna servisa treilera loģistika</text:p>
      <text:p text:style-name="Normal">Nodrošinām ne tikai transportu, bet pilnu loģistikas procesu:</text:p>
      <text:list text:style-name="LFO53" text:continue-numbering="true">
        <text:list-item>
          <text:p text:style-name="P258">kravas pārvadājuma plānošana un maršruta optimizācija<text:s/></text:p>
        </text:list-item>
        <text:list-item>
          <text:p text:style-name="P259">inženiertehniskā sagatavošana lielgabarīta kravām<text:s/></text:p>
        </text:list-item>
        <text:list-item>
          <text:p text:style-name="P260">atļauju un dokumentācijas noformēšana<text:s/></text:p>
        </text:list-item>
        <text:list-item>
          <text:p text:style-name="P261">pavadošā transporta organizēšana (ja nepieciešams)<text:s/></text:p>
        </text:list-item>
        <text:list-item>
          <text:p text:style-name="P262">kravas iekraušanas un izkraušanas koordinēšana<text:s/></text:p>
        </text:list-item>
      </text:list>
      <text:p text:style-name="Normal">Katrs pārvadājums tiek vadīts kā individuāls projekts ar precīzu kontroli visā maršrutā.</text:p>
      <text:p text:style-name="Normal"/>
      <text:p text:style-name="P263">Droši un efektīvi treilera pārvadājumi</text:p>
      <text:p text:style-name="Normal">Mūsu pieredze ļauj nodrošināt uzticamu un prognozējamu loģistiku arī sarežģītos starptautiskos maršrutos. Galvenais fokuss ir kravas drošība, termiņu ievērošana un efektīva transporta plānošana.</text:p>
      <text:p text:style-name="Normal"/>
      <text:p text:style-name="P264">Treilera pārvadājumi Latvijā, Baltijā un Eiropā</text:p>
      <text:p text:style-name="Normal">Regulāri nodrošinām kravu pārvadājumus uz un no Lietuvas, Igaunijas un citām Eiropas valstīm, piedāvājot stabilu loģistikas risinājumu uzņēmumiem, kuriem svarīga ir nepārtraukta un droša kravu kustība.</text:p>
      <text:p text:style-name="Normal"/>
      <text:p text:style-name="P265">Par mums</text:p>
      <text:p text:style-name="P266">SIA DLL-Transports ir stabils un pieredzējis loģistikas un starptautisko kravu pārvadājumu uzņēmums ar vairāk nekā 20 gadu pieredzi nozarē. Mēs nodrošinām pilna servisa transporta un loģistikas risinājumus Latvijā, Baltijas valstīs un visā Eiropā.</text:p>
      <text:p text:style-name="P267">Gadu laikā esam izveidojuši uzticamu partneru tīklu un spēcīgu autoparku, kas ļauj efektīvi organizēt gan vietējos, gan sarežģītus starptautiskos pārvadājumus. Mūsu ikdiena ir FTL un LTL kravu pārvadājumi, lielgabarīta un negabarīta kravas, ADR bīstamās kravas, kā arī specializēti loģistikas un tehnikas pārvadājumu risinājumi.</text:p>
      <text:p text:style-name="P268">Mūsu autoparkā ir vairāk nekā desmit kravas transportlīdzekļi, kas ļauj nodrošināt elastīgus un efektīvus risinājumus dažādu nozaru klientiem. Papildus piedāvājam arī kravu pārkraušanu, uzglabāšanu, pavadošā transporta organizēšanu, kā arī specializēto tehniku — treilerus, autoceltņus, manipulatorus, ekskavatorus un konteineru loģistiku.</text:p>
      <text:p text:style-name="P269">Mēs strādājam ar augstiem kvalitātes standartiem, kur katrs pārvadājums tiek plānots individuāli, nodrošinot drošību, precizitāti un savlaicīgu izpildi.</text:p>
      <text:p text:style-name="Normal"/>
      <text:p text:style-name="P270">Mūsu misija</text:p>
      <text:p text:style-name="Normal">Nodrošināt klientiem iespēju fokusēties uz sava biznesa attīstību, kamēr mēs parūpējamies par efektīvu, drošu un uzticamu loģistiku. Mēs esam partneris, kas samazina loģistikas sarežģītību un palielina piegādes ķēdes efektivitāti.</text:p>
      <text:p text:style-name="Normal"/>
      <text:soft-page-break/>
      <text:p text:style-name="P271">Mūsu vīzija</text:p>
      <text:p text:style-name="Normal">Kļūt par vienu no vadošajiem loģistikas uzņēmumiem Baltijā, nosakot augstus standartus kravu pārvadājumos, klientu apkalpošanā un inovatīvu transporta risinājumu ieviešanā. Mūsu mērķis ir nepārtraukti attīstīt pakalpojumus un vienmēr iet “papildu kilometru” klienta vajadzībām.</text:p>
      <text:p text:style-name="Normal"/>
      <text:p text:style-name="P272">Mūsu vērtības</text:p>
      <text:list text:style-name="LFO58" text:continue-numbering="true">
        <text:list-item>
          <text:p text:style-name="P273">Punktualitāte un precīza termiņu ievērošana<text:s/></text:p>
        </text:list-item>
        <text:list-item>
          <text:p text:style-name="P274">20+ gadu profesionāla pieredze loģistikā<text:s/></text:p>
        </text:list-item>
        <text:list-item>
          <text:p text:style-name="P275">Kvalitāte un drošība katrā pārvadājumā<text:s/></text:p>
        </text:list-item>
        <text:list-item>
          <text:p text:style-name="P276">Atbildība un caurspīdīga sadarbība<text:s/></text:p>
        </text:list-item>
        <text:list-item>
          <text:p text:style-name="P277">Individuāla pieeja katram klientam un projektam</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v" fo:country="LV"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fo:font-weight="normal" style:font-weight-asian="normal" style:font-weight-complex="normal" fo:font-size="11pt" style:font-size-asian="11pt" style:font-size-complex="11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text:style-name="WW_CharLFO5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text-properties fo:color="#EE0000"/>
    </style:style>
  </office:automatic-styles>
  <office:master-styles>
    <style:master-page style:name="MP0" style:page-layout-name="PL0">
      <style:header>
        <text:p text:style-name="P2">PROJEK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td centrs</meta:initial-creator>
    <dc:creator>mtd centrs</dc:creator>
    <meta:creation-date>2026-05-18T08:26:00Z</meta:creation-date>
    <dc:date>2026-05-18T11:29:00Z</dc:date>
    <meta:template xlink:href="Normal.dotm" xlink:type="simple"/>
    <meta:editing-cycles>6</meta:editing-cycles>
    <meta:editing-duration>PT10980S</meta:editing-duration>
    <meta:document-statistic meta:page-count="14" meta:paragraph-count="42" meta:word-count="13559" meta:character-count="21247" meta:row-count="64" meta:non-whitespace-character-count="7730"/>
  </office:meta>
</office:document-meta>
</file>